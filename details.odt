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paragraph-properties style:line-height-at-least="0.3333in"/>
      <style:text-properties style:font-name="Helvetica Neue" fo:font-size="12.0pt" fo:color="#000000"/>
    </style:style>
    <style:style style:name="P2" style:family="paragraph" style:parent-style-name="Standard">
      <style:paragraph-properties fo:text-align="center"/>
      <style:text-properties style:font-name="Helvetica Neue" fo:font-size="24.0pt" fo:color="#000000"/>
    </style:style>
    <style:style style:name="P3" style:family="paragraph" style:parent-style-name="Standard">
      <style:text-properties style:font-name="Times" fo:font-size="12.0pt" fo:color="#000000"/>
    </style:style>
    <style:style style:name="P4" style:family="paragraph" style:parent-style-name="Standard">
      <style:text-properties style:font-name="Times" fo:font-size="12.0pt" fo:color="#181818"/>
    </style:style>
    <style:style style:name="P5" style:family="paragraph" style:parent-style-name="Standard">
      <style:text-properties style:font-name="Helvetica Neue" fo:font-size="12.0pt" fo:color="#181818"/>
    </style:style>
    <style:style style:name="P6" style:family="paragraph" style:parent-style-name="Standard">
      <style:text-properties style:font-name="Helvetica Neue" fo:font-size="16.0pt" fo:color="#ffffff" fo:background-color="#0e0e1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ok I would like to make the QA report generation also automatic, in the sense that:</text:span></text:p>
      <text:p text:style-name="P1"><text:span text:style-name="T1">1. the bot would have a json file that has 10 phone numbers, 10 different scenraios that will be used to hit the /call API in vapi,</text:span></text:p>
      <text:p text:style-name="P1"><text:span text:style-name="T1">2. After each call, the bot would wait async for getting the transcript and mp3 from the python code.</text:span></text:p>
      <text:p text:style-name="P1"><text:span text:style-name="T1">3. once it gets the transcript, it would use gemini to generate the report.</text:span></text:p>
      <text:p text:style-name="P1"><text:span text:style-name="T1">Does that work? I am trying to make it sound like a full QA run , without manual intervention. 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5"><text:span text:style-name="T1">Gemini API key:</text:span></text:p>
      <text:p text:style-name="P5"><text:span text:style-name="T1">AQ.Ab8RN6Is7PmEHtidxA7ox1j4aJ2E5sVxE4Y1MFuJEQuMONDtxA</text:span></text:p>
      <text:p text:style-name="P5"><text:span text:style-name="T1"/></text:p>
      <text:p text:style-name="P5"><text:span text:style-name="T1"/></text:p>
      <text:p text:style-name="P5"><text:span text:style-name="T1">Vapi API key:</text:span></text:p>
      <text:p text:style-name="P5"><text:span text:style-name="T1">751e8bcb-e81a-4083-876d-ad325b4560cd</text:span></text:p>
      <text:p text:style-name="P5"><text:span text:style-name="T1"/></text:p>
      <text:p text:style-name="P6"><text:span text:style-name="T2">+1 (601) 531 82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7</meta:generator>
  </office:meta>
</office:document-meta>
</file>